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5000002B6E58084F37D1DCA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miri Quran" svg:font-family="'Amiri Quran'" style:font-pitch="variable"/>
    <style:font-face style:name="Arial Nova" svg:font-family="'Arial Nova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margin-top="0.302cm" fo:margin-bottom="0.302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 fo:margin-top="0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 fo:margin-top="0.3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 fo:margin-top="0.101cm" fo:margin-bottom="0cm" style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 fo:margin-top="0.101cm" fo:margin-bottom="0.101cm" style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3" style:master-page-name="">
      <loext:graphic-properties draw:fill="none"/>
      <style:paragraph-properties fo:margin-left="1cm" fo:margin-right="0cm" fo:margin-top="0.101cm" fo:margin-bottom="0cm" style:contextual-spacing="false" fo:text-indent="0cm" style:auto-text-indent="false" style:page-number="auto" fo:background-color="transparent" text:number-lines="false" text:line-number="0"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Footer_20_right">
      <style:text-properties officeooo:rsid="0016d435" officeooo:paragraph-rsid="0016d435"/>
    </style:style>
    <style:style style:name="P13" style:family="paragraph" style:parent-style-name="Heading_20_1" style:master-page-name="Endnote">
      <style:paragraph-properties style:page-number="1" fo:break-before="page"/>
      <style:text-properties fo:language="es" fo:country="ES" officeooo:rsid="0014d5d5" officeooo:paragraph-rsid="0016d435"/>
    </style:style>
    <style:style style:name="P14" style:family="paragraph" style:parent-style-name="Heading_20_1">
      <style:text-properties fo:language="es" fo:country="ES" officeooo:rsid="0014d5d5" officeooo:paragraph-rsid="0016d435"/>
    </style:style>
    <style:style style:name="P15" style:family="paragraph" style:parent-style-name="Heading_20_1">
      <style:text-properties fo:language="es" fo:country="ES" officeooo:rsid="0015dc41" officeooo:paragraph-rsid="0015dc41"/>
    </style:style>
    <style:style style:name="P16" style:family="paragraph" style:parent-style-name="Heading_20_1">
      <style:text-properties fo:language="es" fo:country="ES" officeooo:rsid="0018b22e" officeooo:paragraph-rsid="0018b22e"/>
    </style:style>
    <style:style style:name="P17" style:family="paragraph" style:parent-style-name="Heading_20_3">
      <style:text-properties fo:language="es" fo:country="ES" officeooo:paragraph-rsid="0016d435"/>
    </style:style>
    <style:style style:name="P18" style:family="paragraph" style:parent-style-name="Heading_20_3">
      <style:text-properties fo:language="es" fo:country="ES" officeooo:rsid="0016d435" officeooo:paragraph-rsid="0016d435"/>
    </style:style>
    <style:style style:name="P19" style:family="paragraph" style:parent-style-name="Heading_20_3">
      <style:text-properties fo:language="es" fo:country="ES" officeooo:rsid="0018b22e" officeooo:paragraph-rsid="0018b22e"/>
    </style:style>
    <style:style style:name="P20" style:family="paragraph" style:parent-style-name="Standard">
      <style:text-properties fo:language="es" fo:country="ES" officeooo:rsid="0014d5d5" officeooo:paragraph-rsid="0014d5d5"/>
    </style:style>
    <style:style style:name="P21" style:family="paragraph" style:parent-style-name="Standard">
      <style:paragraph-properties fo:text-align="start" style:justify-single-word="false"/>
      <style:text-properties style:font-name="Lucida Handwriting" fo:font-size="18pt" fo:language="es" fo:country="ES" officeooo:rsid="0018b22e" officeooo:paragraph-rsid="0018b22e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Arial Rounded MT Bold" fo:font-size="32pt" fo:language="es" fo:country="ES" officeooo:rsid="0018b22e" officeooo:paragraph-rsid="0018b22e" style:font-size-asian="32pt" style:font-size-complex="32pt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22pt" fo:language="es" fo:country="ES" officeooo:rsid="0018b22e" officeooo:paragraph-rsid="0018b22e" style:font-size-asian="19.25pt" style:font-size-complex="22pt"/>
    </style:style>
    <style:style style:name="P24" style:family="paragraph" style:parent-style-name="Text_20_body" style:list-style-name="L1">
      <style:text-properties officeooo:rsid="0014d5d5" officeooo:paragraph-rsid="0016d435"/>
    </style:style>
    <style:style style:name="P25" style:family="paragraph" style:parent-style-name="Text_20_body">
      <style:text-properties officeooo:rsid="0014d5d5" officeooo:paragraph-rsid="0016d435"/>
    </style:style>
    <style:style style:name="P26" style:family="paragraph" style:parent-style-name="Text_20_body" style:list-style-name="L4">
      <style:text-properties fo:language="es" fo:country="ES" officeooo:rsid="0014d5d5" officeooo:paragraph-rsid="0016d435"/>
    </style:style>
    <style:style style:name="P27" style:family="paragraph" style:parent-style-name="Text_20_body">
      <style:text-properties fo:language="es" fo:country="ES" officeooo:rsid="0014d5d5" officeooo:paragraph-rsid="0016d435"/>
    </style:style>
    <style:style style:name="P28" style:family="paragraph" style:parent-style-name="Text_20_body" style:list-style-name="L4">
      <style:text-properties fo:language="es" fo:country="ES" officeooo:rsid="0015dc41" officeooo:paragraph-rsid="0016d435"/>
    </style:style>
    <style:style style:name="P29" style:family="paragraph" style:parent-style-name="Text_20_body">
      <style:text-properties fo:language="es" fo:country="ES" officeooo:rsid="0016d435" officeooo:paragraph-rsid="0016d435"/>
    </style:style>
    <style:style style:name="P30" style:family="paragraph" style:parent-style-name="Text_20_body" style:list-style-name="L6">
      <style:text-properties fo:language="es" fo:country="ES" officeooo:rsid="0016d435" officeooo:paragraph-rsid="0016d435"/>
    </style:style>
    <style:style style:name="P31" style:family="paragraph" style:parent-style-name="Text_20_body">
      <style:text-properties fo:language="es" fo:country="ES" officeooo:paragraph-rsid="0016d435"/>
    </style:style>
    <style:style style:name="P32" style:family="paragraph" style:parent-style-name="Text_20_body">
      <style:text-properties fo:language="es" fo:country="ES" officeooo:paragraph-rsid="0018b22e"/>
    </style:style>
    <style:style style:name="P33" style:family="paragraph" style:parent-style-name="Text_20_body" style:list-style-name="L7">
      <style:text-properties fo:language="es" fo:country="ES" officeooo:paragraph-rsid="0018b22e"/>
    </style:style>
    <style:style style:name="P34" style:family="paragraph" style:parent-style-name="Text_20_body" style:list-style-name="L8">
      <style:text-properties fo:language="es" fo:country="ES" officeooo:paragraph-rsid="0018b22e"/>
    </style:style>
    <style:style style:name="P35" style:family="paragraph" style:parent-style-name="Text_20_body">
      <style:text-properties fo:language="es" fo:country="ES" officeooo:rsid="0018b22e" officeooo:paragraph-rsid="0018b22e"/>
    </style:style>
    <style:style style:name="P36" style:family="paragraph" style:parent-style-name="Text_20_body">
      <style:text-properties fo:language="es" fo:country="ES" officeooo:rsid="001c06cb" officeooo:paragraph-rsid="001c06cb"/>
    </style:style>
    <style:style style:name="P37" style:family="paragraph" style:parent-style-name="Text_20_body" style:list-style-name="L5">
      <style:text-properties officeooo:rsid="0015dc41" officeooo:paragraph-rsid="0016d435"/>
    </style:style>
    <style:style style:name="P38" style:family="paragraph" style:parent-style-name="Text_20_body">
      <style:text-properties officeooo:rsid="0015dc41" officeooo:paragraph-rsid="0016d435"/>
    </style:style>
    <style:style style:name="T1" style:family="text">
      <style:text-properties fo:language="es" fo:country="ES"/>
    </style:style>
    <style:style style:name="T2" style:family="text">
      <style:text-properties officeooo:rsid="0015dc4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>MEMORIA DEL PROYECTO:</text:p>
      <text:p text:style-name="P22">TASKMASTER AL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1">Ismael Conde Conde<text:tab/><text:tab/> <text:s text:c="2"/><text:tab/><text:tab/>05/2026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11">Índice</text:p>
          </text:index-title>
          <text:p text:style-name="P4"><text:a xlink:type="simple" xlink:href="#__RefHeading___Toc130_263775838" text:style-name="Index_20_Link" text:visited-style-name="Index_20_Link">1. INTRODUCCIÓN<text:tab/>1</text:a></text:p>
          <text:p text:style-name="P3"><text:a xlink:type="simple" xlink:href="#__RefHeading___Toc107_263775838" text:style-name="Index_20_Link" text:visited-style-name="Index_20_Link">2. REQUISITOS TÉCNICOS Y TECNOLOGÍAS<text:tab/>1</text:a></text:p>
          <text:p text:style-name="P1"><text:a xlink:type="simple" xlink:href="#__RefHeading___Toc109_263775838" text:style-name="Index_20_Link" text:visited-style-name="Index_20_Link">3. DISEÑO Y ARQUITECTURA<text:tab/>1</text:a></text:p>
          <text:p text:style-name="P8"><text:a xlink:type="simple" xlink:href="#__RefHeading___Toc111_263775838" text:style-name="Index_20_Link" text:visited-style-name="Index_20_Link">3.1. Modelo de Datos (Entidades)<text:tab/>1</text:a></text:p>
          <text:p text:style-name="P5"><text:a xlink:type="simple" xlink:href="#__RefHeading___Toc113_263775838" text:style-name="Index_20_Link" text:visited-style-name="Index_20_Link">4. FUNCIONALIDADES IMPLEMENTADAS<text:tab/>2</text:a></text:p>
          <text:p text:style-name="P9"><text:a xlink:type="simple" xlink:href="#__RefHeading___Toc137_263775838" text:style-name="Index_20_Link" text:visited-style-name="Index_20_Link">4.1. Gestión de Usuarios<text:tab/>2</text:a></text:p>
          <text:p text:style-name="P6"><text:a xlink:type="simple" xlink:href="#__RefHeading___Toc139_263775838" text:style-name="Index_20_Link" text:visited-style-name="Index_20_Link">4.2. CRUD Completo<text:tab/>2</text:a></text:p>
          <text:p text:style-name="P10"><text:a xlink:type="simple" xlink:href="#__RefHeading___Toc141_263775838" text:style-name="Index_20_Link" text:visited-style-name="Index_20_Link">4.3. Navegación e Interfaz<text:tab/>3</text:a></text:p>
          <text:p text:style-name="P3"><text:a xlink:type="simple" xlink:href="#__RefHeading___Toc143_263775838" text:style-name="Index_20_Link" text:visited-style-name="Index_20_Link">5. ALMACENAMIENTO E INTEGRIDAD ESTRUCTURAL<text:tab/>3</text:a></text:p>
          <text:p text:style-name="P4"><text:a xlink:type="simple" xlink:href="#__RefHeading___Toc145_263775838" text:style-name="Index_20_Link" text:visited-style-name="Index_20_Link">6. EJECUCIÓN DEL PROYECTO<text:tab/>3</text:a></text:p>
          <text:p text:style-name="P3"><text:a xlink:type="simple" xlink:href="#__RefHeading___Toc147_263775838" text:style-name="Index_20_Link" text:visited-style-name="Index_20_Link">7. CONCLUSIÓN<text:tab/>4</text:a></text:p>
        </text:index-body>
      </text:table-of-content>
      <text:p text:style-name="P20"/>
      <text:h text:style-name="P13" text:outline-level="1"><text:bookmark-start text:name="__RefHeading___Toc130_263775838"/>1. INTRODUCCIÓN<text:bookmark-end text:name="__RefHeading___Toc130_263775838"/></text:h>
      <text:p text:style-name="P27">El proyecto “TaskMaster ALS” es una aplicación web de gestión de productividad desarrollada sobre el micro-framework Flask. El objetivo principal es permitir a los usuarios organizar su carga de trabajo mediante una jerarquía de tres niveles: Categorías, Proyectos y Tareas.</text:p>
      <text:p text:style-name="P27"/>
      <text:p text:style-name="P27">La aplicación pone especial énfasis en la experiencia de usuario (UX), la seguridad mediante sesiones autenticadas y la integridad estructural de los datos almacenados en una base de datos NoSQL.</text:p>
      <text:p text:style-name="P27"/>
      <text:h text:style-name="P14" text:outline-level="1"><text:bookmark-start text:name="__RefHeading___Toc107_263775838"/>2. REQUISITOS TÉCNICOS Y TECNOLOGÍAS<text:bookmark-end text:name="__RefHeading___Toc107_263775838"/></text:h>
      <text:p text:style-name="P25"><text:span text:style-name="T1">Para el desarrollo de la práctica se han empleado las siguientes tecnologías exigidas:</text:span></text:p>
      <text:list xml:id="list2141601991" text:style-name="L1">
        <text:list-item>
          <text:p text:style-name="P24"><text:span text:style-name="T1">Lenguaje: Python.</text:span></text:p>
        </text:list-item>
        <text:list-item>
          <text:p text:style-name="P24"><text:span text:style-name="T1">Framework Web: Flask.</text:span></text:p>
        </text:list-item>
        <text:list-item>
          <text:p text:style-name="P24"><text:span text:style-name="T1">Motor de Plantillas: Jinja2.</text:span></text:p>
        </text:list-item>
        <text:list-item>
          <text:p text:style-name="P24"><text:span text:style-name="T1">Persistencia de Datos: Redis mediante la biblioteca Sirope, empleando un modelo de persistencia de objetos.</text:span></text:p>
        </text:list-item>
        <text:list-item>
          <text:p text:style-name="P24"><text:span text:style-name="T1">Gestión de Usuarios: Flask-Login para el manejo de sesiones y Werkzeug para el hashing de contraseñas.</text:span></text:p>
        </text:list-item>
        <text:list-item>
          <text:p text:style-name="P24"><text:span text:style-name="T1">Front-end: HTML5, CSS3 y el framework minimalista Pico CSS.</text:span></text:p>
        </text:list-item>
      </text:list>
      <text:p text:style-name="P25"><text:span text:style-name="T1"/></text:p>
      <text:h text:style-name="P14" text:outline-level="1"><text:bookmark-start text:name="__RefHeading___Toc109_263775838"/>3. DISEÑO Y ARQUITECTURA<text:bookmark-end text:name="__RefHeading___Toc109_263775838"/></text:h>
      <text:p text:style-name="P27">La aplicación sigue un diseño modular, separando claramente las responsabilidades:</text:p>
      <text:list xml:id="list1464709747" text:style-name="L4">
        <text:list-item>
          <text:p text:style-name="P26">model.py: Contiene la <text:span text:style-name="T2">definición de las clases (entidades).</text:span></text:p>
        </text:list-item>
        <text:list-item>
          <text:p text:style-name="P28">app.py: Actúa como controlador principal, gestionando las rutas, la lógica de negocio y la comunicación con la capa de persistencia.</text:p>
        </text:list-item>
        <text:list-item>
          <text:p text:style-name="P28">templates/: Capa de presentación que utiliza Jinja2 para renderizar datos dinámicos</text:p>
        </text:list-item>
      </text:list>
      <text:p text:style-name="P36"/>
      <text:h text:style-name="P17" text:outline-level="3"><text:bookmark-start text:name="__RefHeading___Toc111_263775838"/>3.1. <text:span text:style-name="T2">Modelo de Datos (Entidades)</text:span><text:bookmark-end text:name="__RefHeading___Toc111_263775838"/></text:h>
      <text:p text:style-name="P38"><text:span text:style-name="T1">Se han implementado tres entidades adicionales a la gestión de usuarios:</text:span></text:p>
      <text:list xml:id="list3999966885" text:style-name="L5">
        <text:list-item>
          <text:p text:style-name="P37"><text:span text:style-name="T1">Categoría (Category): Permite agrupar proyectos (ej: “Trabajo”, “Universidad”).</text:span></text:p>
        </text:list-item>
        <text:list-item>
          <text:p text:style-name="P37"><text:soft-page-break/><text:span text:style-name="T1">Proyecto (Project): Entidad central que contiene una descripción y un estado global (Completado/Pendiente).</text:span></text:p>
        </text:list-item>
        <text:list-item>
          <text:p text:style-name="P37"><text:span text:style-name="T1">Tarea (Task): La unidad mínima de trabajo, vinculada a un proyecto específico.</text:span></text:p>
        </text:list-item>
      </text:list>
      <text:p text:style-name="P38"><draw:frame draw:style-name="fr1" draw:name="Imagen1" text:anchor-type="char" svg:width="12.217cm" svg:height="14.593cm" draw:z-index="0"><draw:image xlink:href="Pictures/1000000100000245000002B6E58084F37D1DCA42.png" xlink:type="simple" xlink:show="embed" xlink:actuate="onLoad" draw:mime-type="image/png"/></draw:frame><text:span text:style-name="T1"/></text:p>
      <text:h text:style-name="P15" text:outline-level="1"><text:bookmark-start text:name="__RefHeading___Toc113_263775838"/>4. FUNCIONALIDADES IMPLEMENTADAS<text:bookmark-end text:name="__RefHeading___Toc113_263775838"/></text:h>
      <text:h text:style-name="P18" text:outline-level="3"><text:bookmark-start text:name="__RefHeading___Toc137_263775838"/>4.1. Gestión de Usuarios<text:bookmark-end text:name="__RefHeading___Toc137_263775838"/></text:h>
      <text:p text:style-name="P29">Se ha implementado un sistema completo de registro e inicio de sesión. Las contraseñas no se almacenan en texto plano, sino mediante el uso de hashes criptográficos (pbkdf2:sha256), garantizando la seguridad de las credenciales.</text:p>
      <text:p text:style-name="P29"/>
      <text:h text:style-name="P18" text:outline-level="3"><text:bookmark-start text:name="__RefHeading___Toc139_263775838"/>4.2. CRUD Completo<text:bookmark-end text:name="__RefHeading___Toc139_263775838"/></text:h>
      <text:p text:style-name="P31">La aplicación permite realizar todas las operaciones básicas (Create, Read, Update, Delete) sobre <text:soft-page-break/>las tres entidades:</text:p>
      <text:list xml:id="list2916255085" text:style-name="L6">
        <text:list-item>
          <text:p text:style-name="P30">Creación y eliminación de categorías.</text:p>
        </text:list-item>
        <text:list-item>
          <text:p text:style-name="P30">Creación, edición y borrado de proyectos.</text:p>
        </text:list-item>
        <text:list-item>
          <text:p text:style-name="P30">Añadido, edición de contenido y eliminación de tareas.</text:p>
        </text:list-item>
        <text:list-item>
          <text:p text:style-name="P30">Marcado dinámico de tareas y proyectos como "Completados".</text:p>
        </text:list-item>
      </text:list>
      <text:p text:style-name="P29"/>
      <text:h text:style-name="P19" text:outline-level="3"><text:bookmark-start text:name="__RefHeading___Toc141_263775838"/>4.3. Navegación e Interfaz<text:bookmark-end text:name="__RefHeading___Toc141_263775838"/></text:h>
      <text:p text:style-name="P32">Se ha diseñado una interfaz intuitiva utilizando Pico CSS. El sistema de navegación permite desplazarse entre la lista de proyectos, la gestión de categorías y el detalle de cada proyecto sin necesidad de introducir URLs manualmente. Se han incluido diálogos de confirmación en JavaScript para operaciones críticas (borrado) para mejorar la robustez.</text:p>
      <text:p text:style-name="P32"/>
      <text:h text:style-name="P16" text:outline-level="1"><text:bookmark-start text:name="__RefHeading___Toc143_263775838"/>5. ALMACENAMIENTO E INTEGRIDAD ESTRUCTURAL<text:bookmark-end text:name="__RefHeading___Toc143_263775838"/></text:h>
      <text:p text:style-name="P32">El uso de Sirope ha permitido gestionar los objetos en Redis de forma eficiente. Se han implementado mecanismos para garantizar la consistencia de los datos:</text:p>
      <text:list xml:id="list2889686943" text:style-name="L7">
        <text:list-item>
          <text:p text:style-name="P33">Borrado en Cascada: Al eliminar un objeto de la entidad Project, el sistema identifica y elimina automáticamente todas las Task asociadas a dicho proyecto. Esto evita la existencia de "objetos huérfanos" en la base de datos.</text:p>
        </text:list-item>
        <text:list-item>
          <text:p text:style-name="P33">Gestión de Referencias: Al eliminar una Category, los proyectos asociados actualizan su referencia a None, permitiendo que el sistema siga funcionando bajo la etiqueta "Sin categoría".</text:p>
        </text:list-item>
        <text:list-item>
          <text:p text:style-name="P33">Robustez ante datos antiguos: Se han empleado métodos como getattr() y parches de inicialización en las rutas para asegurar que objetos creados en versiones anteriores del modelo no provoquen excepciones de tipo AttributeError.</text:p>
        </text:list-item>
      </text:list>
      <text:p text:style-name="P32"/>
      <text:h text:style-name="P16" text:outline-level="1"><text:bookmark-start text:name="__RefHeading___Toc145_263775838"/>6. EJECUCIÓN DEL PROYECTO<text:bookmark-end text:name="__RefHeading___Toc145_263775838"/></text:h>
      <text:p text:style-name="P32">La aplicación está preparada para ser ejecutada en un entorno local mediante los siguientes comandos:</text:p>
      <text:list xml:id="list2248439924" text:style-name="L8">
        <text:list-item>
          <text:p text:style-name="P34">Inicio del servidor de datos: redis-server</text:p>
        </text:list-item>
        <text:list-item>
          <text:p text:style-name="P34">Inicio de la aplicación web: flask run (o python app.py)</text:p>
        </text:list-item>
      </text:list>
      <text:p text:style-name="P35">El acceso se realiza a través de la dirección: <text:a xlink:type="simple" xlink:href="http://127.0.0.1:5000/" text:style-name="Internet_20_link" text:visited-style-name="Visited_20_Internet_20_Link">http://127.0.0.1:5000</text:a></text:p>
      <text:p text:style-name="P35"/>
      <text:h text:style-name="P16" text:outline-level="1"><text:bookmark-start text:name="__RefHeading___Toc147_263775838"/><text:soft-page-break/>7. CONCLUSIÓN<text:bookmark-end text:name="__RefHeading___Toc147_263775838"/></text:h>
      <text:p text:style-name="P32">El proyecto cumple satisfactoriamente con todos los requisitos exigidos. La combinación de Flask y Sirope ha permitido crear una herramienta ágil, robusta y con una arquitectura de datos sólida, demostrando la capacidad de gestionar múltiples entidades relacionadas y garantizando la integridad de la información en todo mom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gerian" svg:font-family="Algerian" style:font-family-generic="decorative" style:font-pitch="variable"/>
    <style:font-face style:name="Amiri Quran" svg:font-family="'Amiri Quran'" style:font-pitch="variable"/>
    <style:font-face style:name="Arial Nova" svg:font-family="'Arial Nova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2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5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text-properties officeooo:rsid="0016d435" officeooo:paragraph-rsid="0016d4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>
      <style:footer>
        <text:p text:style-name="Footer_20_right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5-10T16:39:18.666000000</dc:date>
    <meta:editing-duration>PT16M</meta:editing-duration>
    <meta:editing-cycles>4</meta:editing-cycles>
    <meta:generator>LibreOffice/7.2.1.2$Windows_X86_64 LibreOffice_project/87b77fad49947c1441b67c559c339af8f3517e22</meta:generator>
    <meta:document-statistic meta:table-count="0" meta:image-count="1" meta:object-count="0" meta:page-count="6" meta:paragraph-count="60" meta:word-count="687" meta:character-count="4550" meta:non-whitespace-character-count="3938"/>
  </office:meta>
</office:document-meta>
</file>